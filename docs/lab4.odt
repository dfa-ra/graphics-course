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CF779874D19CC302.png" manifest:media-type="image/png"/>
  <manifest:file-entry manifest:full-path="Pictures/100000010000016800000060B8B39A262BEBCDE8.png" manifest:media-type="image/png"/>
  <manifest:file-entry manifest:full-path="Pictures/1000000100000119000000791DD24C2788B7D9FD.png" manifest:media-type="image/png"/>
  <manifest:file-entry manifest:full-path="Pictures/10000001000001DA00000084ED4502EB4273086E.png" manifest:media-type="image/png"/>
  <manifest:file-entry manifest:full-path="Pictures/1000000000000064000000641DB776713E38A0E7.png" manifest:media-type="image/png"/>
  <manifest:file-entry manifest:full-path="Pictures/1000000100000168000000606E54B07E2AFA63C7.png" manifest:media-type="image/png"/>
  <manifest:file-entry manifest:full-path="Pictures/10000001000003ED0000007E26BBD9F12C693867.png" manifest:media-type="image/png"/>
  <manifest:file-entry manifest:full-path="Pictures/1000000100000119000000793B4EFC9A6DBEBE62.png" manifest:media-type="image/png"/>
  <manifest:file-entry manifest:full-path="Pictures/100000010000011900000079F8EC4CB1AFF7B0FD.png" manifest:media-type="image/png"/>
  <manifest:file-entry manifest:full-path="Pictures/100000010000011900000079CE0E8885C971DCFB.png" manifest:media-type="image/png"/>
  <manifest:file-entry manifest:full-path="Pictures/10000001000001DA0000006BF2E93FA40D6BC5C4.png" manifest:media-type="image/png"/>
  <manifest:file-entry manifest:full-path="Pictures/10000001000001E60000006DFC412A25E4CCC83A.png" manifest:media-type="image/png"/>
  <manifest:file-entry manifest:full-path="Pictures/1000000000000064000000645BC6F94F51133105.png" manifest:media-type="image/png"/>
  <manifest:file-entry manifest:full-path="Pictures/100000010000020C0000008D28EEEC934AA6F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5.713cm" fo:margin-right="6.98cm" fo:line-height="173%" fo:text-align="center" style:justify-single-word="false" fo:text-indent="0cm" style:auto-text-indent="false"/>
      <style:text-properties style:font-name="Times New Roman" officeooo:paragraph-rsid="001d2b68"/>
    </style:style>
    <style:style style:name="P2" style:family="paragraph" style:parent-style-name="Standard">
      <style:paragraph-properties fo:margin-left="7.322cm" fo:margin-right="0cm" fo:line-height="173%" fo:text-indent="-1.961cm" style:auto-text-indent="false"/>
      <style:text-properties style:font-name="Times New Roman" officeooo:paragraph-rsid="001d2b68"/>
    </style:style>
    <style:style style:name="P3" style:family="paragraph" style:parent-style-name="Standard">
      <style:paragraph-properties fo:margin-left="0cm" fo:margin-right="1.268cm" fo:margin-top="0.991cm" fo:margin-bottom="0cm" style:contextual-spacing="false" fo:text-align="center" style:justify-single-word="false" fo:text-indent="0cm" style:auto-text-indent="false"/>
      <style:text-properties style:font-name="Times New Roman" officeooo:paragraph-rsid="001d2b68"/>
    </style:style>
    <style:style style:name="P4" style:family="paragraph" style:parent-style-name="Text_20_body">
      <style:paragraph-properties fo:margin-left="0cm" fo:margin-right="1.266cm" fo:margin-top="0cm" fo:margin-bottom="0cm" style:contextual-spacing="false" fo:line-height="173%" fo:text-align="start" style:justify-single-word="false" fo:text-indent="0cm" style:auto-text-indent="false"/>
      <style:text-properties style:font-name="Times New Roman" fo:font-size="12pt" fo:letter-spacing="-0.007cm" officeooo:rsid="001e7c37" officeooo:paragraph-rsid="00203319" style:font-size-asian="12pt"/>
    </style:style>
    <style:style style:name="P5" style:family="paragraph" style:parent-style-name="Text_20_body">
      <style:text-properties style:font-name="Times New Roman" fo:font-size="12pt" officeooo:paragraph-rsid="001d2b68" style:font-size-asian="12pt"/>
    </style:style>
    <style:style style:name="P6" style:family="paragraph" style:parent-style-name="Text_20_body">
      <style:paragraph-properties fo:margin-top="0.074cm" fo:margin-bottom="0cm" style:contextual-spacing="false"/>
      <style:text-properties style:font-name="Times New Roman" fo:font-size="12pt" officeooo:paragraph-rsid="001d2b68" style:font-size-asian="12pt"/>
    </style:style>
    <style:style style:name="P7" style:family="paragraph" style:parent-style-name="Text_20_body">
      <style:paragraph-properties fo:margin-top="0.085cm" fo:margin-bottom="0cm" style:contextual-spacing="false"/>
      <style:text-properties style:font-name="Times New Roman" fo:font-size="12pt" officeooo:paragraph-rsid="001d2b68" style:font-size-asian="12pt"/>
    </style:style>
    <style:style style:name="P8" style:family="paragraph" style:parent-style-name="Text_20_body">
      <style:paragraph-properties fo:margin-top="0.457cm" fo:margin-bottom="0cm" style:contextual-spacing="false"/>
      <style:text-properties style:font-name="Times New Roman" fo:font-size="12pt" officeooo:paragraph-rsid="001d2b68" style:font-size-asian="12pt"/>
    </style:style>
    <style:style style:name="P9" style:family="paragraph" style:parent-style-name="Text_20_body">
      <style:paragraph-properties fo:margin-left="0.212cm" fo:margin-right="0.076cm" fo:line-height="145%" fo:text-indent="0cm" style:auto-text-indent="false"/>
      <style:text-properties style:font-name="Times New Roman" officeooo:paragraph-rsid="001d2b68"/>
    </style:style>
    <style:style style:name="P10" style:family="paragraph" style:parent-style-name="Title">
      <style:text-properties style:font-name="Times New Roman" fo:letter-spacing="-0.004cm" officeooo:paragraph-rsid="001d2b68"/>
    </style:style>
    <style:style style:name="P11" style:family="paragraph" style:parent-style-name="Text_20_body">
      <style:text-properties fo:color="#000000" loext:opacity="100%" style:font-name="Times New Roman" fo:font-size="18pt" fo:letter-spacing="-0.004cm" fo:language="en" fo:country="US" fo:font-weight="bold" officeooo:rsid="00211f9c" officeooo:paragraph-rsid="001d2b68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paragraph-rsid="001d2b68"/>
    </style:style>
    <style:style style:name="P13" style:family="paragraph" style:parent-style-name="Text_20_body">
      <style:paragraph-properties fo:break-before="page"/>
      <style:text-properties officeooo:paragraph-rsid="001d2b68"/>
    </style:style>
    <style:style style:name="P14" style:family="paragraph" style:parent-style-name="Text_20_body">
      <style:text-properties officeooo:rsid="001efcc2" officeooo:paragraph-rsid="001efcc2"/>
    </style:style>
    <style:style style:name="P15" style:family="paragraph" style:parent-style-name="Text_20_body">
      <style:text-properties officeooo:paragraph-rsid="00203319"/>
    </style:style>
    <style:style style:name="P16" style:family="paragraph" style:parent-style-name="Text_20_body">
      <style:text-properties officeooo:rsid="00203319" officeooo:paragraph-rsid="00203319"/>
    </style:style>
    <style:style style:name="P17" style:family="paragraph" style:parent-style-name="Heading_20_2" style:master-page-name="Converted1">
      <style:paragraph-properties style:page-number="auto"/>
      <style:text-properties style:font-name="Times New Roman" officeooo:paragraph-rsid="001d2b68"/>
    </style:style>
    <style:style style:name="P18" style:family="paragraph" style:parent-style-name="Heading_20_2">
      <style:text-properties style:font-name="Times New Roman" officeooo:paragraph-rsid="001d2b68"/>
    </style:style>
    <style:style style:name="P19" style:family="paragraph" style:parent-style-name="Heading_20_2">
      <style:text-properties officeooo:paragraph-rsid="001d2b68"/>
    </style:style>
    <style:style style:name="P20" style:family="paragraph" style:parent-style-name="Heading_20_2">
      <style:text-properties officeooo:rsid="00147968" officeooo:paragraph-rsid="001d2b68"/>
    </style:style>
    <style:style style:name="P21" style:family="paragraph" style:parent-style-name="Heading_20_2">
      <style:text-properties fo:color="#000000" loext:opacity="100%" style:font-name="Times New Roman" fo:font-size="18pt" fo:font-weight="bold" officeooo:paragraph-rsid="001d2b68" style:font-size-asian="18pt" style:font-weight-asian="bold" style:font-size-complex="18pt" style:font-weight-complex="bold"/>
    </style:style>
    <style:style style:name="P22" style:family="paragraph" style:parent-style-name="List_20_Paragraph" style:list-style-name="WWNum4">
      <style:text-properties style:font-name="Times New Roman1" fo:font-size="12pt" officeooo:paragraph-rsid="001d2b68" style:font-size-asian="12pt" style:font-name-complex="Times New Roman2" style:font-size-complex="12pt"/>
    </style:style>
    <style:style style:name="P23" style:family="paragraph" style:parent-style-name="List_20_Paragraph" style:list-style-name="WWNum4">
      <style:text-properties style:font-name="Times New Roman1" fo:font-size="12pt" fo:letter-spacing="-0.004cm" officeooo:rsid="00147968" officeooo:paragraph-rsid="001d2b68" style:font-size-asian="12pt" style:font-name-complex="Times New Roman2" style:font-size-complex="12pt"/>
    </style:style>
    <style:style style:name="P24" style:family="paragraph" style:parent-style-name="List_20_Paragraph" style:list-style-name="WWNum6">
      <style:paragraph-properties fo:line-height="100%"/>
      <style:text-properties officeooo:paragraph-rsid="001d2b68"/>
    </style:style>
    <style:style style:name="P25" style:family="paragraph" style:parent-style-name="List_20_Paragraph" style:list-style-name="WWNum7">
      <style:paragraph-properties fo:line-height="100%"/>
      <style:text-properties officeooo:paragraph-rsid="001d2b68"/>
    </style:style>
    <style:style style:name="P26" style:family="paragraph" style:parent-style-name="Standard" style:master-page-name="Standard">
      <style:paragraph-properties fo:margin-left="0cm" fo:margin-right="1.266cm" fo:margin-top="0.108cm" fo:margin-bottom="0cm" style:contextual-spacing="false" fo:line-height="173%" fo:text-align="center" style:justify-single-word="false" fo:text-indent="0cm" style:auto-text-indent="false" style:page-number="auto"/>
      <style:text-properties style:font-name="Times New Roman" officeooo:paragraph-rsid="001d2b68"/>
    </style:style>
    <style:style style:name="P27" style:family="paragraph" style:parent-style-name="Standard">
      <style:paragraph-properties fo:margin-left="0.002cm" fo:margin-right="1.266cm" fo:line-height="0.487cm" fo:text-align="center" style:justify-single-word="false" fo:text-indent="0cm" style:auto-text-indent="false"/>
      <style:text-properties style:font-name="Times New Roman" officeooo:paragraph-rsid="001d2b68"/>
    </style:style>
    <style:style style:name="P28" style:family="paragraph" style:parent-style-name="Standard">
      <style:paragraph-properties fo:margin-left="1cm" fo:margin-right="0cm" fo:text-indent="0cm" style:auto-text-indent="false"/>
      <style:text-properties style:font-name="Times New Roman1" fo:font-size="12pt" fo:font-style="italic" officeooo:paragraph-rsid="001d2b68" style:font-size-asian="12pt" style:font-style-asian="italic" style:font-name-complex="Times New Roman2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d2b68" style:font-size-asian="12pt"/>
    </style:style>
    <style:style style:name="T3" style:family="text">
      <style:text-properties fo:font-size="12pt" fo:letter-spacing="-0.026cm" style:font-size-asian="12pt"/>
    </style:style>
    <style:style style:name="T4" style:family="text">
      <style:text-properties fo:font-size="12pt" fo:letter-spacing="-0.023cm" style:font-size-asian="12pt"/>
    </style:style>
    <style:style style:name="T5" style:family="text">
      <style:text-properties fo:font-size="12pt" fo:letter-spacing="-0.021cm" style:font-size-asian="12pt"/>
    </style:style>
    <style:style style:name="T6" style:family="text">
      <style:text-properties fo:font-size="12pt" fo:letter-spacing="-0.021cm" officeooo:rsid="000d24c1" style:font-size-asian="12pt"/>
    </style:style>
    <style:style style:name="T7" style:family="text">
      <style:text-properties fo:font-size="12pt" fo:letter-spacing="-0.004cm" style:font-size-asian="12pt"/>
    </style:style>
    <style:style style:name="T8" style:family="text">
      <style:text-properties fo:font-size="12pt" fo:letter-spacing="-0.004cm" officeooo:rsid="001e7c37" style:font-size-asian="12pt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fo:letter-spacing="-0.011cm" style:font-size-asian="12pt"/>
    </style:style>
    <style:style style:name="T11" style:family="text">
      <style:text-properties fo:font-size="12pt" fo:letter-spacing="-0.007cm" style:font-size-asian="12pt"/>
    </style:style>
    <style:style style:name="T12" style:family="text">
      <style:text-properties fo:font-size="12pt" fo:letter-spacing="-0.007cm" officeooo:rsid="001e7c37" style:font-size-asian="12pt"/>
    </style:style>
    <style:style style:name="T13" style:family="text">
      <style:text-properties fo:font-size="12pt" fo:letter-spacing="-0.016cm" style:font-size-asian="12pt"/>
    </style:style>
    <style:style style:name="T14" style:family="text">
      <style:text-properties fo:letter-spacing="-0.005cm"/>
    </style:style>
    <style:style style:name="T15" style:family="text">
      <style:text-properties fo:letter-spacing="-0.004cm"/>
    </style:style>
    <style:style style:name="T16" style:family="text">
      <style:text-properties fo:letter-spacing="-0.004cm" fo:language="en" fo:country="US" officeooo:rsid="001e7c37"/>
    </style:style>
    <style:style style:name="T17" style:family="text">
      <style:text-properties fo:letter-spacing="-0.004cm" fo:language="en" fo:country="US" officeooo:rsid="00211f9c"/>
    </style:style>
    <style:style style:name="T18" style:family="text">
      <style:text-properties style:font-name="Times New Roman" fo:font-size="18pt" fo:letter-spacing="-0.004cm" officeooo:rsid="0019af54" style:font-size-asian="18pt" style:font-size-complex="18pt"/>
    </style:style>
    <style:style style:name="T19" style:family="text">
      <style:text-properties style:font-name="Times New Roman" fo:font-size="18pt" fo:letter-spacing="-0.004cm" officeooo:rsid="00147968" style:font-size-asian="18pt" style:font-size-complex="18pt"/>
    </style:style>
    <style:style style:name="T20" style:family="text">
      <style:text-properties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T21" style:family="text">
      <style:text-properties style:font-name="Times New Roman1" fo:font-size="12pt" style:font-size-asian="12pt" style:font-name-complex="Times New Roman2" style:font-size-complex="12pt"/>
    </style:style>
    <style:style style:name="T22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23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 style:font-style-complex="italic"/>
    </style:style>
    <style:style style:name="T24" style:family="text">
      <style:text-properties style:text-position="sub 58%" style:font-name="Times New Roman1" fo:font-size="12pt" fo:language="en" fo:country="US" style:font-size-asian="12pt" style:font-name-complex="Times New Roman2" style:font-size-complex="12pt"/>
    </style:style>
    <style:style style:name="T25" style:family="text">
      <style:text-properties style:text-position="sub 58%"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T26" style:family="text">
      <style:text-properties style:text-position="sub 58%" style:font-name="Times New Roman1" fo:font-size="12pt" style:font-size-asian="12pt" style:font-name-complex="Times New Roman2" style:font-size-complex="12pt"/>
    </style:style>
    <style:style style:name="T27" style:family="text">
      <style:text-properties fo:color="#000000" loext:opacity="100%" style:font-name="Times New Roman" fo:font-size="18pt" fo:letter-spacing="-0.004cm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000000" loext:opacity="100%" style:font-name="Times New Roman" fo:font-size="18pt" fo:letter-spacing="-0.004cm" fo:language="en" fo:country="US" fo:font-weight="bold" officeooo:rsid="00211f9c" style:font-size-asian="18pt" style:font-weight-asian="bold" style:font-size-complex="18pt" style:font-weight-complex="bold"/>
    </style:style>
    <style:style style:name="T29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loext:opacity="100%" fo:font-size="18pt" fo:language="en" fo:country="US" fo:font-weight="bold" style:font-size-asian="18pt" style:font-weight-asian="bold" style:font-size-complex="18pt" style:font-weight-complex="bold"/>
    </style:style>
    <style:style style:name="T31" style:family="text">
      <style:text-properties fo:color="#000000" loext:opacity="100%"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T32" style:family="text">
      <style:text-properties fo:color="#000000" loext:opacity="100%" style:font-name="Times New Roman1" fo:font-size="12pt" style:font-size-asian="12pt" style:font-name-complex="Times New Roman2" style:font-size-complex="12pt"/>
    </style:style>
    <style:style style:name="T33" style:family="text">
      <style:text-properties fo:color="#000000" loext:opacity="100%" style:font-name="Times New Roman1" fo:font-size="12pt" fo:language="en" fo:country="US" style:font-size-asian="12pt" style:font-name-complex="Times New Roman2" style:font-size-complex="12pt"/>
    </style:style>
    <style:style style:name="T34" style:family="text">
      <style:text-properties officeooo:rsid="001efcc2"/>
    </style:style>
    <style:style style:name="T35" style:family="text">
      <style:text-properties officeooo:rsid="002033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52cm, 0.1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07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62cm, 0.0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76cm, 0.25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1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3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Федеральное</text:span><text:span text:style-name="T3"> </text:span><text:span text:style-name="T1">государственное</text:span><text:span text:style-name="T3"> </text:span><text:span text:style-name="T1">автономное</text:span><text:span text:style-name="T3"> </text:span><text:span text:style-name="T1">образовательное</text:span><text:span text:style-name="T3"> </text:span><text:span text:style-name="T1">учреждение</text:span><text:span text:style-name="T3"> </text:span><text:span text:style-name="T1">высшего образования «Национальный исследовательский университет ИТМО»</text:span></text:p>
      <text:p text:style-name="P27"><text:span text:style-name="T1">Факультет</text:span><text:span text:style-name="T4"> </text:span><text:span text:style-name="T1">программной</text:span><text:span text:style-name="T4"> </text:span><text:span text:style-name="T1">инженерии</text:span><text:span text:style-name="T4"> </text:span><text:span text:style-name="T1">и</text:span><text:span text:style-name="T4"> </text:span><text:span text:style-name="T1">компьютерной</text:span><text:span text:style-name="T5"> </text:span><text:span text:style-name="T7">техни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0">Отчёт</text:p>
      <text:p text:style-name="P3"><text:span text:style-name="T1">по</text:span><text:span text:style-name="T9"> </text:span><text:span text:style-name="T1">Лабораторной</text:span><text:span text:style-name="T9"> </text:span><text:span text:style-name="T1">работе</text:span><text:span text:style-name="T10"> </text:span><text:span text:style-name="T1">№</text:span><text:span text:style-name="T2">4</text:span><text:span text:style-name="T9"><text:line-break/></text:span><text:span text:style-name="T12">по дисцеплине «Алгоритмы Компьютерной График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2"><text:span text:style-name="T1"><text:s text:c="4"/>Выполнил:</text:span><text:span text:style-name="T5"> </text:span><text:span text:style-name="T6">Захарченко Роман Владимирович</text:span><text:span text:style-name="T1">,</text:span><text:span text:style-name="T5"> </text:span><text:span text:style-name="T1">группа</text:span><text:span text:style-name="T5"> </text:span><text:span text:style-name="T1">P3331 Преподаватель:</text:span><text:span text:style-name="T13"> </text:span><text:span text:style-name="T8">Игорь Станриславович Потёмин</text:span></text:p>
      <text:p text:style-name="P5"/>
      <text:p text:style-name="P8"/>
      <text:p text:style-name="P1"><text:span text:style-name="T7">Санкт-Петербург </text:span><text:span text:style-name="T11">2025</text:span></text:p>
      <text:h text:style-name="P17" text:outline-level="2">Цель<text:span text:style-name="T14"> </text:span><text:span text:style-name="T15">работы</text:span></text:h>
      <text:p text:style-name="P9"><text:s/>Овладеть навыками расчета и визуализации распределения яркости на диффузной сфере, освещенной точечными источниками света.</text:p>
      <text:h text:style-name="P19" text:outline-level="2"><text:span text:style-name="T18">З</text:span><text:span text:style-name="T19">адачи</text:span></text:h>
      <text:p text:style-name="P28"/>
      <text:list xml:id="list2335305770" text:style-name="WWNum4">
        <text:list-item>
          <text:p text:style-name="P22">Провести расчет распределения яркости на сфере в пределах заданной области. Рекомендуемые пределы значений параметров для расчета:</text:p>
        </text:list-item>
      </text:list>
      <text:list xml:id="list3921947784" text:style-name="WWNum6">
        <text:list-item>
          <text:p text:style-name="P24"><text:span text:style-name="T31">Размер прямоугольного экрана </text:span><text:span text:style-name="T32">по высоте (</text:span><text:span text:style-name="T33">H</text:span><text:span text:style-name="T32">) и ширине (</text:span><text:span text:style-name="T33">W</text:span><text:span text:style-name="T32">) варьируются в диапазоне от 100 до 10000 миллиметров.</text:span></text:p>
        </text:list-item>
        <text:list-item>
          <text:p text:style-name="P24"><text:span text:style-name="T20">Разрешение изображения</text:span><text:span text:style-name="T21"> по высоте (</text:span><text:span text:style-name="T22">Hres</text:span><text:span text:style-name="T21">) и ширине (</text:span><text:span text:style-name="T22">Wres</text:span><text:span text:style-name="T21">) варьируются в диапазоне от 200 до 800 пикселей. Разрешение должно обеспечивать квадратные пиксели.</text:span></text:p>
        </text:list-item>
        <text:list-item>
          <text:p text:style-name="P24"><text:span text:style-name="T20">Координаты источников света</text:span><text:span text:style-name="T21"> (</text:span><text:span text:style-name="T22">x</text:span><text:span text:style-name="T24">Li</text:span><text:span text:style-name="T21">, </text:span><text:span text:style-name="T22">y</text:span><text:span text:style-name="T24">Li</text:span><text:span text:style-name="T21">, </text:span><text:span text:style-name="T22">z</text:span><text:span text:style-name="T24">Li</text:span><text:span text:style-name="T21">) [мм] по осям </text:span><text:span text:style-name="T22">X</text:span><text:span text:style-name="T21"> и </text:span><text:span text:style-name="T22">Y</text:span><text:span text:style-name="T21"> </text:span><text:span text:style-name="T22">X</text:span><text:span text:style-name="T21">±10000, по оси </text:span><text:span text:style-name="T22">Z</text:span><text:span text:style-name="T21"> от 100 до 10000.</text:span><text:span text:style-name="T20"> </text:span></text:p>
        </text:list-item>
        <text:list-item>
          <text:p text:style-name="P24"><text:span text:style-name="T20">Координаты наблюдателя:</text:span><text:span text:style-name="T21"> </text:span><text:span text:style-name="T22">(0, 0, z</text:span><text:span text:style-name="T24">O</text:span><text:span text:style-name="T21">) [мм].</text:span></text:p>
        </text:list-item>
        <text:list-item text:style-override="WWNum7">
          <text:p text:style-name="P25"><text:span text:style-name="T20">Координаты центра сферы</text:span><text:span text:style-name="T21"> (</text:span><text:span text:style-name="T22">x</text:span><text:span text:style-name="T26">С</text:span><text:span text:style-name="T21">, </text:span><text:span text:style-name="T22">y</text:span><text:span text:style-name="T26">С</text:span><text:span text:style-name="T21">, </text:span><text:span text:style-name="T22">z</text:span><text:span text:style-name="T26">С</text:span><text:span text:style-name="T21">) [мм] по осям </text:span><text:span text:style-name="T22">X</text:span><text:span text:style-name="T21"> и </text:span><text:span text:style-name="T22">Y</text:span><text:span text:style-name="T21"> ±10000, по оси </text:span><text:span text:style-name="T22">Z</text:span><text:span text:style-name="T21"> от 100 до 10000. Сфера должна целиком помещаться в область видимости.</text:span></text:p>
        </text:list-item>
        <text:list-item>
          <text:p text:style-name="P24"><text:span text:style-name="T20">Сила излучения </text:span><text:span text:style-name="T23">I</text:span><text:span text:style-name="T25">0</text:span><text:span text:style-name="T21"> варьируются от 0.01 до 10000 Вт/ср.</text:span></text:p>
        </text:list-item>
        <text:list-item>
          <text:p text:style-name="P24"><text:span text:style-name="T20">Параметры модели Блинн-Фонга.<text:tab/> </text:span><text:span text:style-name="T21">Выбираются так, чтобы на изображении был виден ярко выраженный пик.</text:span></text:p>
        </text:list-item>
      </text:list>
      <text:list xml:id="list90630079300725" text:continue-list="list2335305770" text:style-name="WWNum4">
        <text:list-item>
          <text:p text:style-name="P22">Написать приложение на Python, формирующее изображение рассчитанного распределения яркости для заданного разрешения с нормировкой (0-255) на максимальное значение яркости.</text:p>
        </text:list-item>
        <text:list-item>
          <text:p text:style-name="P22">Записать сформированное изображение в файл</text:p>
        </text:list-item>
        <text:list-item>
          <text:p text:style-name="P23">Визуализировать изображение на мониторе.</text:p>
        </text:list-item>
      </text:list>
      <text:h text:style-name="P20" text:outline-level="2"><text:span text:style-name="T28">Т</text:span><text:span text:style-name="T27">еория </text:span></text:h>
      <text:p text:style-name="P12">Алгоритм работы рендера основан на трассировке лучей и модели освещения Блинна–Фонга. Для каждого пикселя формируется луч из точки наблюдателя O через точку на экране. Далее определяется пересечение луча со сферой радиуса R и центром C. <text:span text:style-name="T34">Решаем квадратное получившееся квадратное уравнение. (D — направление луча, R — радиус сферы, О — точка наблюдателя, P — точка пересечения луча с поверхностью сферы.)</text:span></text:p>
      <text:p text:style-name="P12"><draw:frame draw:style-name="fr12" draw:name="Image5" text:anchor-type="char" svg:x="0.03cm" svg:y="-0.191cm" svg:width="4.763cm" svg:height="0.956cm" draw:z-index="4"><draw:image xlink:href="Pictures/100000010000016800000060B8B39A262BEBCDE8.png" xlink:type="simple" xlink:show="embed" xlink:actuate="onLoad" draw:mime-type="image/png"/></draw:frame></text:p>
      <text:p text:style-name="P12"><draw:frame draw:style-name="fr11" draw:name="Image6" text:anchor-type="char" svg:x="-0.601cm" svg:y="-0.042cm" svg:width="4.763cm" svg:height="1.074cm" draw:z-index="5"><draw:image xlink:href="Pictures/1000000100000168000000606E54B07E2AFA63C7.png" xlink:type="simple" xlink:show="embed" xlink:actuate="onLoad" draw:mime-type="image/png"/></draw:frame><draw:frame draw:style-name="fr10" draw:name="Image4" text:anchor-type="char" svg:x="4.791cm" svg:y="-0.249cm" svg:width="13.046cm" svg:height="1.291cm" draw:z-index="3"><draw:image xlink:href="Pictures/10000001000003ED0000007E26BBD9F12C693867.png" xlink:type="simple" xlink:show="embed" xlink:actuate="onLoad" draw:mime-type="image/png"/></draw:frame></text:p>
      <text:p text:style-name="P12"/>
      <text:p text:style-name="P14">Если дискриминант &lt;0 пересечений нет, иначе выбираем меньший корень.</text:p>
      <text:p text:style-name="P14">Далее В точке пересечения P вычисляется нормаль к поверхности сферы и вектор направления на наблюдателя: <draw:frame draw:style-name="fr9" draw:name="Image7" text:anchor-type="char" svg:x="2.697cm" svg:y="0.631cm" svg:width="3.718cm" svg:height="1.48cm" draw:z-index="6"><draw:image xlink:href="Pictures/1000000100000119000000791DD24C2788B7D9FD.png" xlink:type="simple" xlink:show="embed" xlink:actuate="onLoad" draw:mime-type="image/png"/></draw:frame><draw:frame draw:style-name="fr8" draw:name="Image8" text:anchor-type="char" svg:x="6.666cm" svg:y="0.69cm" svg:width="3.718cm" svg:height="1.498cm" draw:z-index="7"><draw:image xlink:href="Pictures/100000010000011900000079F8EC4CB1AFF7B0FD.png" xlink:type="simple" xlink:show="embed" xlink:actuate="onLoad" draw:mime-type="image/png"/></draw:frame></text:p>
      <text:p text:style-name="P14"/>
      <text:p text:style-name="P15"><text:span text:style-name="T35">Далее д</text:span>ля каждого источника света с координатами Si, вычисляется вектор направления света <text:span text:style-name="T35">и полувектор Блина:</text:span><draw:frame draw:style-name="fr7" draw:name="Image9" text:anchor-type="char" svg:x="3.755cm" svg:y="0.661cm" svg:width="3.718cm" svg:height="1.455cm" draw:z-index="8"><draw:image xlink:href="Pictures/1000000100000119000000793B4EFC9A6DBEBE62.png" xlink:type="simple" xlink:show="embed" xlink:actuate="onLoad" draw:mime-type="image/png"/></draw:frame><text:span text:style-name="T35"><text:tab/><text:tab/><text:tab/><text:tab/><text:tab/></text:span><draw:frame draw:style-name="fr6" draw:name="Image10" text:anchor-type="char" svg:x="7.652cm" svg:y="0.646cm" svg:width="3.554cm" svg:height="1.529cm" draw:z-index="9"><draw:image xlink:href="Pictures/100000010000011900000079CE0E8885C971DCFB.png" xlink:type="simple" xlink:show="embed" xlink:actuate="onLoad" draw:mime-type="image/png"/></draw:frame></text:p>
      <text:p text:style-name="P13"/>
      <text:p text:style-name="P12">Диффузная составляющая определяется по модели Ламберта <text:span text:style-name="T35">и </text:span>зеркальная составляющая по модели Блинна–Фонга:</text:p>
      <text:p text:style-name="P12"><draw:frame draw:style-name="fr5" draw:name="Image11" text:anchor-type="char" svg:x="0.672cm" svg:y="-0.162cm" svg:width="6.271cm" svg:height="1.222cm" draw:z-index="10"><draw:image xlink:href="Pictures/10000001000001DA0000006BF2E93FA40D6BC5C4.png" xlink:type="simple" xlink:show="embed" xlink:actuate="onLoad" draw:mime-type="image/png"/></draw:frame><draw:frame draw:style-name="fr4" draw:name="Image12" text:anchor-type="char" svg:x="6.766cm" svg:y="-0.162cm" svg:width="6.352cm" svg:height="1.443cm" draw:z-index="11"><draw:image xlink:href="Pictures/10000001000001E60000006DFC412A25E4CCC83A.png" xlink:type="simple" xlink:show="embed" xlink:actuate="onLoad" draw:mime-type="image/png"/></draw:frame></text:p>
      <text:p text:style-name="P12"/>
      <text:p text:style-name="P12"><text:span text:style-name="T35">Учитываем </text:span>ослабление света по закону обратных квадратов:<draw:frame draw:style-name="fr3" draw:name="Image13" text:anchor-type="char" svg:x="11.989cm" svg:y="-0.162cm" svg:width="6.271cm" svg:height="1.595cm" draw:z-index="12"><draw:image xlink:href="Pictures/10000001000001DA00000084ED4502EB4273086E.png" xlink:type="simple" xlink:show="embed" xlink:actuate="onLoad" draw:mime-type="image/png"/></draw:frame></text:p>
      <text:p text:style-name="P12"/>
      <text:p text:style-name="P12">Полная освещённость точки фо<draw:frame draw:style-name="fr2" draw:name="Image14" text:anchor-type="char" svg:x="5.736cm" svg:y="0.478cm" svg:width="6.78cm" svg:height="1.743cm" draw:z-index="13"><draw:image xlink:href="Pictures/100000010000020C0000008D28EEEC934AA6FD40.png" xlink:type="simple" xlink:show="embed" xlink:actuate="onLoad" draw:mime-type="image/png"/></draw:frame>рмируется суммированием вкладов всех источников света:</text:p>
      <text:p text:style-name="P12"/>
      <text:p text:style-name="P12"/>
      <text:p text:style-name="P16">Далее просто нормируем всё по 0-255. Алгоритм кончился!!</text:p>
      <text:h text:style-name="P21" text:outline-level="2"><text:span text:style-name="T16">Код </text:span><text:span text:style-name="T17">и результат его работы</text:span></text:h>
      <text:p text:style-name="P11"><draw:frame draw:style-name="fr1" draw:name="Image1" text:anchor-type="char" svg:x="-0.118cm" svg:y="-0.104cm" svg:width="5.602cm" svg:height="5.602cm" draw:z-index="0"><draw:image xlink:href="Pictures/1000000000000064000000645BC6F94F51133105.png" xlink:type="simple" xlink:show="embed" xlink:actuate="onLoad" draw:mime-type="image/png"/></draw:frame><draw:frame draw:style-name="fr1" draw:name="Image2" text:anchor-type="char" svg:x="5.951cm" svg:y="-0.104cm" svg:width="5.641cm" svg:height="5.641cm" draw:z-index="1"><draw:image xlink:href="Pictures/1000000000000064000000641DB776713E38A0E7.png" xlink:type="simple" xlink:show="embed" xlink:actuate="onLoad" draw:mime-type="image/png"/></draw:frame><draw:frame draw:style-name="fr1" draw:name="Image3" text:anchor-type="char" svg:x="12.086cm" svg:y="-0.136cm" svg:width="5.666cm" svg:height="5.666cm" draw:z-index="2"><draw:image xlink:href="Pictures/100000000000006400000064CF779874D19CC30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18" text:outline-level="2"><text:span text:style-name="T29">Вывод</text:span><text:span text:style-name="T30">:</text:span></text:h>
      <text:p text:style-name="P4">В лабораторной работе реализован рендеринг сферы с использованием модели освещения<text:line-break/>Блинна–Фонга. Программа рассчитывает пересечение лучей с поверхностью сферы, учитывает диффузное и зеркальное отражение от нескольких источников света и нормализует яркость для отображения. Результатом является визуализация сферической поверхности с корректными бликами и градиентами освещённости, позволяющая наблюдать эффект освещения с разных позиций наблюдате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0.021cm" fo:margin-right="1.266cm" fo:margin-top="0.002cm" fo:margin-bottom="0cm" style:contextual-spacing="false" fo:text-align="center" style:justify-single-word="false" fo:text-indent="0cm" style:auto-text-indent="false"/>
      <style:text-properties fo:font-size="28pt" style:font-size-asian="28pt" style:font-size-complex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7cm" fo:margin-bottom="0.494cm" fo:margin-left="1.27cm" fo:margin-right="1.27cm" style:writing-mode="lr-tb" style:layout-grid-color="#c0c0c0" style:layout-grid-lines="2853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3:37:23.986601902</meta:creation-date>
    <dc:date>2025-11-22T15:45:29.921779205</dc:date>
    <meta:editing-duration>PT1H14M57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3" meta:paragraph-count="32" meta:word-count="416" meta:character-count="3090" meta:non-whitespace-character-count="2702"/>
  </office:meta>
</office:document-meta>
</file>